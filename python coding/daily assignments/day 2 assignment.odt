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JhengHei" svg:font-family="'Microsoft Jheng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T1" style:family="text">
      <style:text-properties fo:color="#6aab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cbec4"/>
    </style:style>
    <style:style style:name="T4" style:family="text">
      <style:text-properties fo:color="#bcbec4" fo:background-color="#1e1f22"/>
    </style:style>
    <style:style style:name="T5" style:family="text">
      <style:text-properties fo:color="#bcbec4" fo:font-size="15pt" fo:background-color="#1e1f22" style:font-size-asian="15pt" style:font-size-complex="15pt"/>
    </style:style>
    <style:style style:name="T6" style:family="text">
      <style:text-properties fo:color="#bcbec4" fo:font-size="15pt" style:font-size-asian="15pt" style:font-size-complex="15pt"/>
    </style:style>
    <style:style style:name="T7" style:family="text">
      <style:text-properties fo:color="#bcbec4" fo:font-size="16pt" fo:background-color="#1e1f22" style:font-size-asian="16pt" style:font-size-complex="16pt"/>
    </style:style>
    <style:style style:name="T8" style:family="text">
      <style:text-properties fo:color="#bcbec4" fo:font-size="16pt" fo:font-weight="bold" fo:background-color="#1e1f22" style:font-size-asian="16pt" style:font-weight-asian="bold" style:font-size-complex="16pt" style:font-weight-complex="bold"/>
    </style:style>
    <style:style style:name="T9" style:family="text">
      <style:text-properties style:font-name="Arial"/>
    </style:style>
    <style:style style:name="T10" style:family="text">
      <style:text-properties style:font-name="Microsoft JhengHei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svg:stroke-width="0.0402in" svg:stroke-color="#6666ff" draw:marker-start-width="0.1992in" draw:marker-end-width="0.199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799in" svg:stroke-color="#6666ff" draw:marker-start-width="0.2575in" draw:marker-end-width="0.2575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0000" draw:marker-start-width="0.1992in" draw:marker-end-width="0.199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#</text:span><text:span text:style-name="T10">printing list</text:span></text:p>
      <text:p text:style-name="P1">'''fruits=['apple','banana','kiwi','watermelon','papaya']</text:p>
      <text:p text:style-name="P1">print(fruits)</text:p>
      <text:p text:style-name="P1">fruits.append('grapes')</text:p>
      <text:p text:style-name="P1">fruits.remove('kiwi')</text:p>
      <text:p text:style-name="P1">print('updated list',fruits)</text:p>
      <text:p text:style-name="P1">print('second fruit',fruits[1])</text:p>
      <text:p text:style-name="P1">print('fourth fruit',fruits[3])</text:p>
      <text:p text:style-name="P1">print('first three fruits',fruits[:3])</text:p>
      <text:p text:style-name="P1"><text:span text:style-name="T1">print(len(fruits))'''</text:span>fruits.append(<text:span text:style-name="T1">'dargonfruit'</text:span>)</text:p>
      <text:p text:style-name="P1"/>
      <text:p text:style-name="P1"/>
      <text:p text:style-name="P3">output:</text:p>
      <text:p text:style-name="P1">['apple', 'banana', 'kiwi', 'watermelon', 'papaya']</text:p>
      <text:p text:style-name="P1">updated list ['apple', 'banana', 'watermelon', 'papaya', 'grapes', 'dargonfruit']</text:p>
      <text:p text:style-name="P1">second fruit banana</text:p>
      <text:p text:style-name="P1">fourth fruit papaya</text:p>
      <text:p text:style-name="P1">first three fruits ['apple', 'banana', 'watermelon']</text:p>
      <text:p text:style-name="P1">6</text:p>
      <text:p text:style-name="P1"><draw:line text:anchor-type="paragraph" draw:z-index="0" draw:style-name="gr1" draw:text-style-name="P5" svg:x1="0.0047in" svg:y1="-0.1252in" svg:x2="6.9004in" svg:y2="-0.189in"><text:p/></draw:line>''''#printing tuple</text:p>
      <text:p text:style-name="P1">cities1=('hyderabad','bengalore','mumbai')</text:p>
      <text:p text:style-name="P1">print( 'first tuple',cities1)</text:p>
      <text:p text:style-name="P1">print('first city',cities1[0])</text:p>
      <text:p text:style-name="P1">print('last city',cities1[2])</text:p>
      <text:p text:style-name="P1">cities2=('chennai','pune')</text:p>
      <text:p text:style-name="P1">print( 'second tuple',cities2)</text:p>
      <text:p text:style-name="P1">c3=cities1+cities2</text:p>
      <text:p text:style-name="P1">print("concatenated tuple",c3)</text:p>
      <text:p text:style-name="P1">#changing element in tuple causes error</text:p>
      <text:p text:style-name="P1">try:</text:p>
      <text:p text:style-name="P1"><text:s text:c="4"/>cities1[0]='delhi'</text:p>
      <text:p text:style-name="P1">except TypeError as e:</text:p>
      <text:p text:style-name="P1"><text:s text:c="4"/>print("Error:",e)</text:p>
      <text:p text:style-name="P1">a,b,c=cities1</text:p>
      <text:p text:style-name="P1">print('unpacked cities:',a,b,c)</text:p>
      <text:p text:style-name="P1">'''</text:p>
      <text:p text:style-name="P3">output:"C:</text:p>
      <text:p text:style-name="P1">first tuple ('hyderabad', 'bengalore', 'mumbai')</text:p>
      <text:p text:style-name="P1">first city hyderabad</text:p>
      <text:p text:style-name="P1">last city mumbai</text:p>
      <text:p text:style-name="P1">second tuple ('chennai', 'pune')</text:p>
      <text:p text:style-name="P1"><text:soft-page-break/>concatenated tuple ('hyderabad', 'bengalore', 'mumbai', 'chennai', 'pune')</text:p>
      <text:p text:style-name="P1">Error: 'tuple' object does not support item assignment</text:p>
      <text:p text:style-name="P1">unpacked cities: hyderabad bengalore mumbai</text:p>
      <text:p text:style-name="P1"/>
      <text:p text:style-name="P1">Process finished with exit code 0</text:p>
      <text:p text:style-name="P1"><draw:line text:anchor-type="paragraph" draw:z-index="1" draw:style-name="gr2" draw:text-style-name="P5" svg:x1="0.0563in" svg:y1="0.2575in" svg:x2="6.9417in" svg:y2="0.1846in"><text:p/></draw:line></text:p>
      <text:p text:style-name="P4"/>
      <text:p text:style-name="P4"><text:span text:style-name="T3">#printing set</text:span></text:p>
      <text:p text:style-name="P4">'''set1={'pink','blue','white','black','grey'}</text:p>
      <text:p text:style-name="P4">print('colours:',set1)</text:p>
      <text:p text:style-name="P4">set1.add('green')</text:p>
      <text:p text:style-name="P4">print(set1)</text:p>
      <text:p text:style-name="P4">set1.pop()</text:p>
      <text:p text:style-name="P4">print('updatedset:',set1)</text:p>
      <text:p text:style-name="P4">set2={'brown','red','ash'}</text:p>
      <text:p text:style-name="P4">print(set2)</text:p>
      <text:p text:style-name="P4">print('intersection:',set1.intersection(set2))</text:p>
      <text:p text:style-name="P4">print('union:',set1.union(set2))</text:p>
      <text:p text:style-name="P4">print('difference:',set1.difference(set2))</text:p>
      <text:p text:style-name="P4">print("is 'red' in colour?","red" in set1)</text:p>
      <text:p text:style-name="P4">fruits={'apple','banana','mango','apple','banana'}</text:p>
      <text:p text:style-name="P4">unique_fruits=set(fruits)</text:p>
      <text:p text:style-name="P4">print('unique fruits:',unique_fruits)</text:p>
      <text:p text:style-name="P4">'''</text:p>
      <text:p text:style-name="P2"><text:span text:style-name="T2">output:"C</text:span>:</text:p>
      <text:p text:style-name="P4">colours: {'blue', 'black', 'white', 'grey', 'pink'}</text:p>
      <text:p text:style-name="P4">{'blue', 'black', 'green', 'white', 'grey', 'pink'}</text:p>
      <text:p text:style-name="P4">updatedset: {'black', 'green', 'white', 'grey', 'pink'}</text:p>
      <text:p text:style-name="P4">{'ash', 'red', 'brown'}</text:p>
      <text:p text:style-name="P4">intersection: set()</text:p>
      <text:p text:style-name="P4">union: {'black', 'brown', 'green', 'ash', 'white', 'red', 'grey', 'pink'}</text:p>
      <text:p text:style-name="P4">difference: {'black', 'white', 'pink', 'green', 'grey'}</text:p>
      <text:p text:style-name="P4">is 'red' in colour? False</text:p>
      <text:p text:style-name="P4">unique fruits: {'apple', 'mango', 'banana'}</text:p>
      <text:p text:style-name="P4"><draw:line text:anchor-type="paragraph" draw:z-index="2" draw:style-name="gr3" draw:text-style-name="P5" svg:x1="1.0146in" svg:y1="0.2323in" svg:x2="7.9102in" svg:y2="0.128in"><text:p/></draw:line><draw:line text:anchor-type="paragraph" draw:z-index="3" draw:style-name="gr1" draw:text-style-name="P5" svg:x1="0.0457in" svg:y1="0.1382in" svg:x2="6.9728in" svg:y2="0.1173in"><text:p/></draw:line><draw:line text:anchor-type="paragraph" draw:z-index="4" draw:style-name="gr4" draw:text-style-name="P5" svg:x1="1.8689in" svg:y1="0.0654in" svg:x2="1.8689in" svg:y2="0.2528in"><text:p/></draw:line></text:p>
      <text:p text:style-name="Standard"><text:span text:style-name="T3">'</text:span><text:span text:style-name="T6">''#printing dictonory</text:span></text:p>
      <text:p text:style-name="P4">dict={ 'name':'shreya','age':22,'hobby':'cooking'}</text:p>
      <text:p text:style-name="P4">print(dict)</text:p>
      <text:p text:style-name="P4">print('Name:',dict['name'])</text:p>
      <text:p text:style-name="P4"><text:soft-page-break/>dict['hobby']='dancing'</text:p>
      <text:p text:style-name="P4">print('updated dict:',dict)</text:p>
      <text:p text:style-name="P4">print('keys:',dict.keys())</text:p>
      <text:p text:style-name="P4">print('values:',dict.values())</text:p>
      <text:p text:style-name="P4">dict.pop('age')</text:p>
      <text:p text:style-name="P4">print('final set:',dict)</text:p>
      <text:p text:style-name="P4">'''</text:p>
      <text:p text:style-name="Standard"><text:span text:style-name="T13">output</text:span><text:span text:style-name="T4">:</text:span></text:p>
      <text:p text:style-name="Standard">{'<text:span text:style-name="T11">name': 'shreya', 'age': 22, 'hobby': 'cooking'}</text:span></text:p>
      <text:p text:style-name="P4">Name: shreya</text:p>
      <text:p text:style-name="P4">updated dict: {'name': 'shreya', 'age': 22, 'hobby': 'dancing'}</text:p>
      <text:p text:style-name="P4">keys: dict_keys(['name', 'age', 'hobby'])</text:p>
      <text:p text:style-name="P4">values: dict_values(['shreya', 22, 'dancing'])</text:p>
      <text:p text:style-name="P4">final set: {'name': 'shreya', 'hobby': 'dancing'}</text:p>
      <text:p text:style-name="P4"><draw:line text:anchor-type="paragraph" draw:z-index="5" draw:style-name="gr1" draw:text-style-name="P5" svg:x1="-0.0272in" svg:y1="0.189in" svg:x2="7.0039in" svg:y2="0.189in"><text:p/></draw:lin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JhengHei" svg:font-family="'Microsoft Jheng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23T20:18:24.87</meta:creation-date>
    <dc:date>2026-04-23T21:34:18.72</dc:date>
    <meta:editing-duration>PT1H15M57S</meta:editing-duration>
    <meta:editing-cycles>2</meta:editing-cycles>
    <meta:generator>OpenOffice/4.1.16$Win32 OpenOffice.org_project/4116m3$Build-9816</meta:generator>
    <meta:document-statistic meta:table-count="0" meta:image-count="0" meta:object-count="0" meta:page-count="3" meta:paragraph-count="88" meta:word-count="238" meta:character-count="2661"/>
  </office:meta>
</office:document-meta>
</file>