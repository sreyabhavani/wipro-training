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style:page-number="auto"/>
    </style:style>
    <style:style style:name="P2" style:family="paragraph" style:parent-style-name="Heading_20_2">
      <style:paragraph-properties fo:break-before="page"/>
    </style:style>
    <style:style style:name="T1" style:family="text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70545362582778127" text:style-name="Outline">
        <text:list-item>
          <text:p text:style-name="P1">OrangeHRM Automation Project</text:p>
        </text:list-item>
      </text:list>
      <text:p text:style-name="Standard">This document contains the important source files from the OrangeHRM Automation project.</text:p>
      <text:p text:style-name="Standard"/>
      <text:list xml:id="list28868205" text:continue-numbering="true" text:style-name="Outline">
        <text:list-item>
          <text:list>
            <text:list-item>
              <text:h text:style-name="P2" text:outline-level="2">environment.py</text:h>
            </text:list-item>
          </text:list>
        </text:list-item>
      </text:list>
      <text:p text:style-name="Standard"><text:span text:style-name="T1">from webbrowser import Edge<text:line-break/><text:line-break/>from selenium import webdriver<text:line-break/>from webdriver_manager.chrome import ChromeDriverManager<text:line-break/>from selenium.webdriver.chrome.service import Service<text:line-break/>from webdriver_manager.drivers.edge import EdgeChromiumDriver<text:line-break/>from webdriver_manager.microsoft import EdgeChromiumDriverManager<text:line-break/><text:line-break/><text:line-break/>def before_all(context):<text:line-break/> <text:s text:c="3"/>service = Service(Edge)<text:line-break/> <text:s text:c="3"/>context.driver = webdriver.Edge(service=service)<text:line-break/> <text:s text:c="3"/>context.driver.maximize_window()<text:line-break/> <text:s text:c="3"/>context.driver.implicitly_wait(10)<text:line-break/><text:line-break/>def after_all(context):<text:line-break/> <text:s text:c="3"/>context.driver.quit()</text:span></text:p>
      <text:p text:style-name="Standard"/>
      <text:list xml:id="list28865801" text:continue-numbering="true" text:style-name="Outline">
        <text:list-item>
          <text:list>
            <text:list-item>
              <text:h text:style-name="P2" text:outline-level="2">requirements.txt</text:h>
            </text:list-item>
          </text:list>
        </text:list-item>
      </text:list>
      <text:p text:style-name="Standard"><text:span text:style-name="T1">selenium<text:line-break/>behave<text:line-break/>webdriver-manager</text:span></text:p>
      <text:p text:style-name="Standard"/>
      <text:list xml:id="list28865723" text:continue-numbering="true" text:style-name="Outline">
        <text:list-item>
          <text:list>
            <text:list-item>
              <text:h text:style-name="P2" text:outline-level="2">features/admin_search.feature</text:h>
            </text:list-item>
          </text:list>
        </text:list-item>
      </text:list>
      <text:p text:style-name="Standard"><text:span text:style-name="T1">Feature: Admin Search<text:line-break/><text:line-break/>Background:<text:line-break/> <text:s/>Given user is logged in<text:line-break/><text:line-break/>Scenario: Search user with filters<text:line-break/> <text:s/>When user goes to admin page<text:line-break/> <text:s/>And user enters search data<text:line-break/> <text:s text:c="3"/>| Username | Admin |<text:line-break/> <text:s text:c="3"/>| UserRole | ESS |<text:line-break/> <text:s text:c="3"/>| Status <text:s text:c="2"/>| Enabled |<text:line-break/> <text:s/>And clicks search<text:line-break/> <text:s/>Then results should be display</text:span></text:p>
      <text:list xml:id="list28867204" text:continue-numbering="true" text:style-name="Outline">
        <text:list-item>
          <text:list>
            <text:list-item>
              <text:h text:style-name="P2" text:outline-level="2">features/leave.feature</text:h>
            </text:list-item>
          </text:list>
        </text:list-item>
      </text:list>
      <text:p text:style-name="Standard"><text:span text:style-name="T1">Feature: Apply Leave<text:line-break/><text:line-break/>Background:<text:line-break/> <text:s/>Given user is logged in<text:line-break/><text:line-break/>Scenario: Apply medical leave<text:line-break/> <text:s/>When user goes to Leave page<text:line-break/> <text:s/>And user applies leave<text:line-break/> <text:s/>Then leave should be applied</text:span></text:p>
      <text:p text:style-name="Standard"/>
      <text:list xml:id="list28838967" text:continue-numbering="true" text:style-name="Outline">
        <text:list-item>
          <text:list>
            <text:list-item>
              <text:h text:style-name="P2" text:outline-level="2">features/login.feature</text:h>
            </text:list-item>
          </text:list>
        </text:list-item>
      </text:list>
      <text:p text:style-name="Standard"><text:span text:style-name="T1">Feature: Login Functionality<text:line-break/><text:line-break/>Background:<text:line-break/> <text:s/>Given user is on login page<text:line-break/><text:line-break/>Scenario: Successful login<text:line-break/> <text:s/>When user enters username "Admin"<text:line-break/> <text:s/>And user enters password "admin123"<text:line-break/> <text:s/>And clicks login button<text:line-break/> <text:s/>Then user should see dashboard</text:span></text:p>
      <text:p text:style-name="Standard"/>
      <text:list xml:id="list28842213" text:continue-numbering="true" text:style-name="Outline">
        <text:list-item>
          <text:list>
            <text:list-item>
              <text:h text:style-name="P2" text:outline-level="2">features/pim.feature</text:h>
            </text:list-item>
          </text:list>
        </text:list-item>
      </text:list>
      <text:p text:style-name="Standard"><text:span text:style-name="T1">Feature: Add Employee<text:line-break/><text:line-break/>Background:<text:line-break/> <text:s/>Given user is logged in<text:line-break/><text:line-break/>Scenario Outline: Add multiple employees<text:line-break/> <text:s/>When user goes to PIM page<text:line-break/> <text:s/>And user adds employee "&lt;FirstName&gt;" "&lt;LastName&gt;"<text:line-break/> <text:s/>Then employee should be added<text:line-break/><text:line-break/>Examples:<text:line-break/> <text:s/>| FirstName | LastName |<text:line-break/> <text:s/>| John <text:s text:c="5"/>| Smith <text:s text:c="3"/>|<text:line-break/> <text:s/>| Alice <text:s text:c="4"/>| Brown <text:s text:c="3"/>|<text:line-break/> <text:s/>| David <text:s text:c="4"/>| Lee <text:s text:c="5"/>|</text:span></text:p>
      <text:p text:style-name="Standard"/>
      <text:list xml:id="list28863673" text:continue-numbering="true" text:style-name="Outline">
        <text:list-item>
          <text:list>
            <text:list-item>
              <text:h text:style-name="P2" text:outline-level="2">features/profile.feature</text:h>
            </text:list-item>
          </text:list>
        </text:list-item>
      </text:list>
      <text:p text:style-name="Standard"><text:span text:style-name="T1">@Smoke @Regression @Profile<text:line-break/>Feature: Update Profile<text:line-break/><text:line-break/>Background:<text:line-break/> <text:s/>Given user is logged in<text:line-break/><text:line-break/>Scenario: Update nickname<text:line-break/> <text:s/>When user goes to My Info page<text:line-break/> <text:s/>And user updates nickname "Shreya"<text:line-break/> <text:s/>Then profile should be updated</text:span></text:p>
      <text:p text:style-name="Standard"/>
      <text:list xml:id="list28837394" text:continue-numbering="true" text:style-name="Outline">
        <text:list-item>
          <text:list>
            <text:list-item>
              <text:h text:style-name="P2" text:outline-level="2">pages/admin_page.py</text:h>
            </text:list-item>
          </text:list>
        </text:list-item>
      </text:list>
      <text:p text:style-name="Standard"><text:span text:style-name="T1">from selenium.webdriver.common.by import By<text:line-break/><text:line-break/>class AdminPage:<text:line-break/><text:line-break/> <text:s text:c="3"/>def __init__(self, driver):<text:line-break/> <text:s text:c="7"/>self.driver = driver<text:line-break/><text:line-break/> <text:s text:c="3"/>def open_admin(self):<text:line-break/> <text:s text:c="7"/>self.driver.find_element(By.XPATH, "//span[text()='Admin']").click()<text:line-break/><text:line-break/> <text:s text:c="3"/>def enter_data(self, data):<text:line-break/> <text:s text:c="7"/>if "Username" in data:<text:line-break/> <text:s text:c="11"/>self.driver.find_element(By.XPATH, "//input[@placeholder='Username']").send_keys(data["Username"])<text:line-break/><text:line-break/> <text:s text:c="7"/>if "UserRole" in data:<text:line-break/> <text:s text:c="11"/>self.driver.find_element(By.XPATH, "(//div[@class='oxd-select-text'])[1]").click()<text:line-break/> <text:s text:c="11"/>self.driver.find_element(By.XPATH, f"//span[text()='{data['UserRole']}']").click()<text:line-break/><text:line-break/> <text:s text:c="7"/>if "Status" in data:<text:line-break/> <text:s text:c="11"/>self.driver.find_element(By.XPATH, "(//div[@class='oxd-select-text'])[2]").click()<text:line-break/> <text:s text:c="11"/>self.driver.find_element(By.XPATH, f"//span[text()='{data['Status']}']").click()<text:line-break/><text:line-break/> <text:s text:c="3"/>def click_search(self):<text:line-break/> <text:s text:c="7"/>self.driver.find_element(By.XPATH, "//button[@type='submit']").click()<text:line-break/><text:line-break/> <text:s text:c="3"/>def is_result_visible(self):<text:line-break/> <text:s text:c="7"/>return self.driver.find_element(By.XPATH, "//div[@class='oxd-table-body']").is_displayed()</text:span></text:p>
      <text:p text:style-name="Standard"/>
      <text:list xml:id="list28849205" text:continue-numbering="true" text:style-name="Outline">
        <text:list-item>
          <text:list>
            <text:list-item>
              <text:h text:style-name="P2" text:outline-level="2">pages/leave_page.py</text:h>
            </text:list-item>
          </text:list>
        </text:list-item>
      </text:list>
      <text:p text:style-name="Standard"><text:span text:style-name="T1">from selenium.webdriver.common.by import By<text:line-break/><text:line-break/>class LeavePage:<text:line-break/><text:line-break/> <text:s text:c="3"/>def __init__(self, driver):<text:line-break/> <text:s text:c="7"/>self.driver = driver<text:line-break/><text:line-break/> <text:s text:c="3"/>def open_leave(self):<text:line-break/> <text:s text:c="7"/>self.driver.find_element(By.XPATH, "//span[text()='Leave']").click()<text:line-break/><text:line-break/> <text:s text:c="3"/>def apply_leave(self):<text:line-break/> <text:s text:c="7"/>self.driver.find_element(By.XPATH, "//a[text()='Apply']").click()<text:line-break/> <text:s text:c="7"/>self.driver.find_element(By.XPATH, "//button[@type='submit']").click()<text:line-break/><text:line-break/> <text:s text:c="3"/>def is_leave_applied(self):<text:line-break/> <text:s text:c="7"/>return True <text:s/># simplified for demo</text:span></text:p>
      <text:p text:style-name="Standard"/>
      <text:list xml:id="list28856631" text:continue-numbering="true" text:style-name="Outline">
        <text:list-item>
          <text:list>
            <text:list-item>
              <text:h text:style-name="P2" text:outline-level="2">pages/login_page.py</text:h>
            </text:list-item>
          </text:list>
        </text:list-item>
      </text:list>
      <text:p text:style-name="Standard"><text:span text:style-name="T1">from selenium.webdriver.common.by import By<text:line-break/><text:line-break/>class LoginPage:<text:line-break/><text:line-break/> <text:s text:c="3"/>def __init__(self, driver):<text:line-break/> <text:s text:c="7"/>self.driver = driver<text:line-break/><text:line-break/> <text:s text:c="3"/>def open(self):<text:line-break/> <text:s text:c="7"/>self.driver.get("https://opensource-demo.orangehrmlive.com/web/index.php/auth/login")<text:line-break/><text:line-break/> <text:s text:c="3"/>def enter_username(self, username):<text:line-break/> <text:s text:c="7"/>self.driver.find_element(By.NAME, "username").send_keys(username)<text:line-break/><text:line-break/> <text:s text:c="3"/>def enter_password(self, password):<text:line-break/> <text:s text:c="7"/>self.driver.find_element(By.NAME, "password").send_keys(password)<text:line-break/><text:line-break/> <text:s text:c="3"/>def click_login(self):<text:line-break/> <text:s text:c="7"/>self.driver.find_element(By.XPATH, "//button[@type='submit']").click()<text:line-break/><text:line-break/> <text:s text:c="3"/>def is_dashboard_visible(self):<text:line-break/> <text:s text:c="7"/>return "dashboard" in self.driver.current_url</text:span></text:p>
      <text:p text:style-name="Standard"/>
      <text:list xml:id="list28869154" text:continue-numbering="true" text:style-name="Outline">
        <text:list-item>
          <text:list>
            <text:list-item>
              <text:h text:style-name="P2" text:outline-level="2">pages/pim_page.py</text:h>
            </text:list-item>
          </text:list>
        </text:list-item>
      </text:list>
      <text:p text:style-name="Standard"><text:span text:style-name="T1">from selenium.webdriver.common.by import By<text:line-break/><text:line-break/>class PimPage:<text:line-break/><text:line-break/> <text:s text:c="3"/>def __init__(self, driver):<text:line-break/> <text:s text:c="7"/>self.driver = driver<text:line-break/><text:line-break/> <text:s text:c="3"/>def open_pim(self):<text:line-break/> <text:s text:c="7"/>self.driver.find_element(By.XPATH, "//span[text()='PIM']").click()<text:line-break/><text:line-break/> <text:s text:c="3"/>def add_employee(self, fname, lname):<text:line-break/> <text:s text:c="7"/>self.driver.find_element(By.XPATH, "//button[text()=' Add ']").click()<text:line-break/> <text:s text:c="7"/>self.driver.find_element(By.NAME, "firstName").send_keys(fname)<text:line-break/> <text:s text:c="7"/>self.driver.find_element(By.NAME, "lastName").send_keys(lname)<text:line-break/> <text:s text:c="7"/>self.driver.find_element(By.XPATH, "//button[@type='submit']").click()<text:line-break/><text:line-break/> <text:s text:c="3"/>def is_employee_added(self):<text:line-break/> <text:s text:c="7"/>return "viewPersonalDetails" in self.driver.current_url</text:span></text:p>
      <text:p text:style-name="Standard"/>
      <text:list xml:id="list28843259" text:continue-numbering="true" text:style-name="Outline">
        <text:list-item>
          <text:list>
            <text:list-item>
              <text:h text:style-name="P2" text:outline-level="2">pages/profile_page.py</text:h>
            </text:list-item>
          </text:list>
        </text:list-item>
      </text:list>
      <text:p text:style-name="Standard"><text:span text:style-name="T1">from selenium.webdriver.common.by import By<text:line-break/><text:line-break/>class ProfilePage:<text:line-break/><text:line-break/> <text:s text:c="3"/>def __init__(self, driver):<text:line-break/> <text:s text:c="7"/>self.driver = driver<text:line-break/><text:line-break/> <text:s text:c="3"/>def open_profile(self):<text:line-break/> <text:s text:c="7"/>self.driver.find_element(By.XPATH, "//span[text()='My Info']").click()<text:line-break/><text:line-break/> <text:s text:c="3"/>def update_name(self, name):<text:line-break/> <text:s text:c="7"/>field = self.driver.find_element(By.NAME, "nickname")<text:line-break/> <text:s text:c="7"/>field.clear()<text:line-break/> <text:s text:c="7"/>field.send_keys(name)<text:line-break/> <text:s text:c="7"/>self.driver.find_element(By.XPATH, "//button[@type='submit']").click()<text:line-break/><text:line-break/> <text:s text:c="3"/>def is_updated(self):<text:line-break/> <text:s text:c="7"/>return True</text:span></text:p>
      <text:p text:style-name="Standard"/>
      <text:list xml:id="list28848983" text:continue-numbering="true" text:style-name="Outline">
        <text:list-item>
          <text:list>
            <text:list-item>
              <text:h text:style-name="P2" text:outline-level="2">pages/__init__.py</text:h>
            </text:list-item>
          </text:list>
        </text:list-item>
      </text:list>
      <text:p text:style-name="Standard"/>
      <text:p text:style-name="Standard">Could not read file: All strings must be XML compatible: Unicode or ASCII, no NULL bytes or control characters</text:p>
      <text:p text:style-name="Standard"/>
      <text:list xml:id="list28847229" text:continue-numbering="true" text:style-name="Outline">
        <text:list-item>
          <text:list>
            <text:list-item>
              <text:h text:style-name="P2" text:outline-level="2">steps/admin_steps.py</text:h>
            </text:list-item>
          </text:list>
        </text:list-item>
      </text:list>
      <text:p text:style-name="Standard"><text:span text:style-name="T1">from behave import given, when, then<text:line-break/>from pages.admin_page import AdminPage<text:line-break/>from pages.login_page import LoginPage<text:line-break/><text:line-break/>@given('user is logged in')<text:line-break/>def step_impl(context):<text:line-break/> <text:s text:c="3"/>login = LoginPage(context.driver)<text:line-break/> <text:s text:c="3"/>login.open()<text:line-break/> <text:s text:c="3"/>login.enter_username("Admin")<text:line-break/> <text:s text:c="3"/>login.enter_password("admin123")<text:line-break/> <text:s text:c="3"/>login.click_login()<text:line-break/> <text:s text:c="3"/>context.admin = AdminPage(context.driver)<text:line-break/><text:line-break/>@when('user goes to admin page')<text:line-break/>def step_impl(context):<text:line-break/> <text:s text:c="3"/>context.admin.open_admin()<text:line-break/><text:line-break/>@when('user enters search data')<text:line-break/>def step_impl(context):<text:line-break/> <text:s text:c="3"/>data = {}<text:line-break/> <text:s text:c="3"/>for row in context.table:<text:line-break/> <text:s text:c="7"/>data[row[0]] = row[1]<text:line-break/> <text:s text:c="3"/>context.admin.enter_data(data)<text:line-break/><text:line-break/>@when('clicks search')<text:line-break/>def step_impl(context):<text:line-break/> <text:s text:c="3"/>context.admin.click_search()<text:line-break/><text:line-break/>@then('results should be displayed')<text:line-break/>def step_impl(context):<text:line-break/> <text:s text:c="3"/>assert context.admin.is_result_visible()</text:span></text:p>
      <text:p text:style-name="Standard"/>
      <text:list xml:id="list28866959" text:continue-numbering="true" text:style-name="Outline">
        <text:list-item>
          <text:list>
            <text:list-item>
              <text:h text:style-name="P2" text:outline-level="2">steps/leave_steps.py</text:h>
            </text:list-item>
          </text:list>
        </text:list-item>
      </text:list>
      <text:p text:style-name="Standard"><text:span text:style-name="T1">from behave import when, then<text:line-break/>from pages.leave_page import LeavePage<text:line-break/><text:line-break/>@when('user goes to Leave page')<text:line-break/>def step_impl(context):<text:line-break/> <text:s text:c="3"/>context.leave = LeavePage(context.driver)<text:line-break/> <text:s text:c="3"/>context.leave.open_leave()<text:line-break/><text:line-break/>@when('user applies leave')<text:line-break/>def step_impl(context):<text:line-break/> <text:s text:c="3"/>context.leave.apply_leave()<text:line-break/><text:line-break/>@then('leave should be applied')<text:line-break/>def step_impl(context):<text:line-break/> <text:s text:c="3"/>assert context.leave.is_leave_applied()</text:span></text:p>
      <text:p text:style-name="Standard"/>
      <text:list xml:id="list28860738" text:continue-numbering="true" text:style-name="Outline">
        <text:list-item>
          <text:list>
            <text:list-item>
              <text:h text:style-name="P2" text:outline-level="2">steps/login_steps.py</text:h>
            </text:list-item>
          </text:list>
        </text:list-item>
      </text:list>
      <text:p text:style-name="Standard"><text:span text:style-name="T1">from behave import given, when, then<text:line-break/>from pages.login_page import LoginPage<text:line-break/><text:line-break/>@given('user is on login page')<text:line-break/>def step_impl(context):<text:line-break/> <text:s text:c="3"/>context.login_page = LoginPage(context.driver)<text:line-break/> <text:s text:c="3"/>context.login_page.open()<text:line-break/><text:line-break/>@when('user enters username "{username}"')<text:line-break/>def step_impl(context, username):<text:line-break/> <text:s text:c="3"/>context.login_page.enter_username(username)<text:line-break/><text:line-break/>@when('user enters password "{password}"')<text:line-break/>def step_impl(context, password):<text:line-break/> <text:s text:c="3"/>context.login_page.enter_password(password)<text:line-break/><text:line-break/>@when('clicks login button')<text:line-break/>def step_impl(context):<text:line-break/> <text:s text:c="3"/>context.login_page.click_login()<text:line-break/><text:line-break/>@then('user should see dashboard')<text:line-break/>def step_impl(context):<text:line-break/> <text:s text:c="3"/>assert context.login_page.is_dashboard_visible()</text:span></text:p>
      <text:p text:style-name="Standard"/>
      <text:list xml:id="list28840998" text:continue-numbering="true" text:style-name="Outline">
        <text:list-item>
          <text:list>
            <text:list-item>
              <text:h text:style-name="P2" text:outline-level="2">steps/pim_steps.py</text:h>
            </text:list-item>
          </text:list>
        </text:list-item>
      </text:list>
      <text:p text:style-name="Standard"><text:span text:style-name="T1">from behave import when, then<text:line-break/>from pages.pim_page import PimPage<text:line-break/><text:line-break/>@when('user goes to PIM page')<text:line-break/>def step_impl(context):<text:line-break/> <text:s text:c="3"/>context.pim = PimPage(context.driver)<text:line-break/> <text:s text:c="3"/>context.pim.open_pim()<text:line-break/><text:line-break/>@when('user adds employee "{fname}" "{lname}"')<text:line-break/>def step_impl(context, fname, lname):<text:line-break/> <text:s text:c="3"/>context.pim.add_employee(fname, lname)<text:line-break/><text:line-break/>@then('employee should be added')<text:line-break/>def step_impl(context):<text:line-break/> <text:s text:c="3"/>assert context.pim.is_employee_added()</text:span></text:p>
      <text:p text:style-name="Standard"/>
      <text:list xml:id="list28866929" text:continue-numbering="true" text:style-name="Outline">
        <text:list-item>
          <text:list>
            <text:list-item>
              <text:h text:style-name="P2" text:outline-level="2">steps/profile_steps.py</text:h>
            </text:list-item>
          </text:list>
        </text:list-item>
      </text:list>
      <text:p text:style-name="Standard"><text:span text:style-name="T1">from behave import when, then<text:line-break/>from pages.profile_page import ProfilePage<text:line-break/><text:line-break/>@when('user goes to My Info page')<text:line-break/>def step_impl(context):<text:line-break/> <text:s text:c="3"/>context.profile = ProfilePage(context.driver)<text:line-break/> <text:s text:c="3"/>context.profile.open_profile()<text:line-break/><text:line-break/>@when('user updates nickname "{name}"')<text:line-break/>def step_impl(context, name):<text:line-break/> <text:s text:c="3"/>context.profile.update_name(name)<text:line-break/><text:line-break/>@then('profile should be updated')<text:line-break/>def step_impl(context):<text:line-break/> <text:s text:c="3"/>assert context.profile.is_updated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Standard" style:default-outline-level="" style:list-style-name="" style:class="list">
      <style:paragraph-properties fo:margin-left="0.25in" fo:margin-right="0in" fo:text-indent="-0.25in" style:auto-text-indent="false"/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3335in" fo:margin-bottom="0in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39in" fo:margin-bottom="0in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39in" fo:margin-bottom="0in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39in" fo:margin-bottom="0in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in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139in" fo:margin-bottom="0in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139in" fo:margin-bottom="0in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139in" fo:margin-bottom="0in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2083in" fo:line-height="100%" fo:text-align="start" style:justify-single-word="false" fo:padding-left="0in" fo:padding-right="0in" fo:padding-top="0in" fo:padding-bottom="0.0555in" fo:border-left="none" fo:border-right="none" fo:border-top="none" fo:border-bottom="0.0138in solid #4f81bd"/>
      <style:text-properties fo:color="#17365d" style:font-name="Calibri" fo:font-size="26pt" fo:letter-spacing="0.0035in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102in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in" fo:margin-bottom="0.0835in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in" fo:margin-bottom="0.0835in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0.75in" fo:margin-right="0in" fo:margin-top="0in" fo:margin-bottom="0.0835in" fo:text-indent="-0.25in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25in" fo:margin-right="0in" fo:margin-top="0in" fo:margin-bottom="0.0835in" fo:text-indent="0in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0.75in" fo:margin-right="0in" fo:margin-top="0in" fo:margin-bottom="0.0835in" fo:text-indent="0in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0.65in" fo:margin-right="0.65in" fo:margin-top="0.139in" fo:margin-bottom="0.1945in" fo:text-indent="0in" style:auto-text-indent="false" fo:padding-left="0in" fo:padding-right="0in" fo:padding-top="0in" fo:padding-bottom="0.0555in" fo:border-left="none" fo:border-right="none" fo:border-top="none" fo:border-bottom="0.0071in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35in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102in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26-05-09T03:25:00</meta:creation-date>
    <dc:date>2026-05-09T08:57:59.34</dc:date>
    <meta:editing-duration>PT1S</meta:editing-duration>
    <meta:generator>OpenOffice/4.1.16$Win32 OpenOffice.org_project/4116m3$Build-9816</meta:generator>
    <meta:document-statistic meta:table-count="0" meta:image-count="0" meta:object-count="0" meta:page-count="1" meta:paragraph-count="38" meta:word-count="697" meta:character-count="85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